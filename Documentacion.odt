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Kalimati" svg:font-family="Kalimat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c78" officeooo:paragraph-rsid="00159c78"/>
    </style:style>
    <style:style style:name="P2" style:family="paragraph" style:parent-style-name="Standard">
      <style:text-properties style:font-name="FreeSans" fo:font-weight="bold" officeooo:rsid="00159c78" officeooo:paragraph-rsid="00159c78" style:font-weight-asian="bold" style:font-weight-complex="bold"/>
    </style:style>
    <style:style style:name="P3" style:family="paragraph" style:parent-style-name="Standard">
      <style:text-properties style:font-name="FreeSans" officeooo:rsid="00159c78" officeooo:paragraph-rsid="00159c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ción del Sistema de Gestión Clínica</text:p>
      <text:p text:style-name="P2"/>
      <text:p text:style-name="P2">- Cómo ejecutar el sistema</text:p>
      <text:p text:style-name="P3">1. Abrir una terminal dentro de la carpeta donde se encuentra “cli.py”</text:p>
      <text:p text:style-name="P3">(en mi caso “~/COMPUTACION 2025/CLINICA/computaci-n-2025-05-27-gesti-n-cl-nica-carlastacchiola”)</text:p>
      <text:p text:style-name="P3">2. Ejecutar python3 cli.py</text:p>
      <text:p text:style-name="P3"/>
      <text:p text:style-name="P3">Eso inicia el menú interactivo del sistema de gestión clínica, a partir de ahí ya se puede empezar a utilizar el sistema.</text:p>
      <text:p text:style-name="P3"/>
      <text:p text:style-name="P2">- Cómo ejecutar las pruebas</text:p>
      <text:p text:style-name="P3">1. Abrir una terminal dentro de la carpeta donde se encuentra “/COMPUTACION 2025/CLINICA/computaci-n-2025-05-27-gesti-n-cl-nica-carlastacchiola”</text:p>
      <text:p text:style-name="P3">2. Ejecutar python3 -m unittest tests/test_clinica.py (test_clinica es un ejemplo de como ejecutarlo, pero se pueden ejecutar todos los que desee)</text:p>
      <text:p text:style-name="P3"/>
      <text:p text:style-name="P2">- Explicación de diseño general</text:p>
      <text:p text:style-name="P3">El sistema está organizado en clases con responsabilidades separadas: </text:p>
      <text:p text:style-name="P3"/>
      <text:p text:style-name="P3">- Paciente: contiene nombre, apellido, DNI y fecha de nacimiento.</text:p>
      <text:p text:style-name="P3">- Medico: contiene nombre, apellido, matrícula y especialidades.</text:p>
      <text:p text:style-name="P3">- Especialidad: nombre y días de atención.</text:p>
      <text:p text:style-name="P3">- Turno: une paciente, médico, especialidad, fecha y hora.</text:p>
      <text:p text:style-name="P3">- Receta: lista de medicamentos emitida por un médico.</text:p>
      <text:p text:style-name="P3">- Historia Clínica: lista de turnos y recetas de un paciente.</text:p>
      <text:p text:style-name="P3">- Clínica: gestiona pacientes, médicos, turnos e historias clínicas.</text:p>
      <text:p text:style-name="P3">- Excepciones: define errores personalizados como:</text:p>
      <text:p text:style-name="P3"><text:tab/>- Paciente no encontrado</text:p>
      <text:p text:style-name="P3"><text:tab/>- Médico no disponible en un día</text:p>
      <text:p text:style-name="P3"><text:tab/>- Turno duplicado</text:p>
      <text:p text:style-name="P3"><text:tab/>- Receta inválida</text:p>
      <text:p text:style-name="P3">- CLI (cli.py): interfaz interactiva para ingresar datos, mostrar información y manejar errores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Kalimati" svg:font-family="Kalimat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22:30:58.482263297</meta:creation-date>
    <dc:date>2025-06-11T22:43:45.612169722</dc:date>
    <meta:editing-duration>PT1M9S</meta:editing-duration>
    <meta:editing-cycles>1</meta:editing-cycles>
    <meta:document-statistic meta:table-count="0" meta:image-count="0" meta:object-count="0" meta:page-count="1" meta:paragraph-count="24" meta:word-count="206" meta:character-count="1453" meta:non-whitespace-character-count="1266"/>
    <meta:generator>LibreOffice/24.2.6.2$Linux_X86_64 LibreOffice_project/420$Build-2</meta:generator>
  </office:meta>
</office:document-meta>
</file>